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ce style:name="Arial2" svg:font-family="Arial, Helvetica"/>
    <style:font-face style:name="OpenSymbol" svg:font-family="OpenSymbol"/>
    <style:font-face style:name="Tahoma1" svg:font-family="Tahoma"/>
    <style:font-face style:name="sans-serif" svg:font-family="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size="11pt" style:font-size-asian="11pt" style:font-size-complex="11pt"/>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text-align="justify" style:justify-single-word="false" fo:text-indent="0cm" style:auto-text-indent="false"/>
    </style:style>
    <style:style style:name="P4" style:family="paragraph" style:parent-style-name="Text_20_body">
      <style:paragraph-properties fo:margin-left="0cm" fo:margin-right="0cm" fo:text-indent="0cm" style:auto-text-indent="false"/>
      <style:text-properties fo:font-variant="normal" fo:text-transform="none" fo:color="#000000" style:font-name="Arial1" fo:font-size="11pt" fo:letter-spacing="normal" fo:font-style="normal" fo:font-weight="normal" style:font-size-asian="11pt" style:font-size-complex="11pt"/>
    </style:style>
    <style:style style:name="P5" style:family="paragraph" style:parent-style-name="Text_20_body">
      <style:paragraph-properties fo:margin-left="0cm" fo:margin-right="0cm" style:line-height-at-least="0.503cm" fo:text-indent="0cm" style:auto-text-indent="false"/>
      <style:text-properties fo:font-variant="normal" fo:text-transform="none" fo:color="#000000" style:font-name="sans-serif" fo:font-size="9.75pt" fo:letter-spacing="normal" fo:font-style="normal" fo:font-weight="normal"/>
    </style:style>
    <style:style style:name="P6" style:family="paragraph" style:parent-style-name="Text_20_body">
      <style:paragraph-properties fo:margin-left="0cm" fo:margin-right="0cm" style:line-height-at-least="0.503cm" fo:text-indent="0cm" style:auto-text-indent="false"/>
    </style:style>
    <style:style style:name="P7" style:family="paragraph" style:parent-style-name="Text_20_body">
      <style:paragraph-properties fo:margin-top="0cm" fo:margin-bottom="0cm" style:line-height-at-least="0.503cm" fo:padding="0cm" fo:border="none"/>
      <style:text-properties fo:font-variant="normal" fo:text-transform="none" fo:color="#000000" style:font-name="sans-serif" fo:font-size="9.75pt" fo:letter-spacing="normal" fo:font-style="normal" fo:font-weight="bold"/>
    </style:style>
    <style:style style:name="P8" style:family="paragraph" style:parent-style-name="Text_20_body">
      <style:paragraph-properties fo:margin-top="0cm" fo:margin-bottom="0cm" style:line-height-at-least="0.503cm" fo:padding="0cm" fo:border="none"/>
      <style:text-properties fo:font-variant="normal" fo:text-transform="none" fo:color="#000000" style:font-name="sans-serif" fo:font-size="9.75pt" fo:letter-spacing="normal" fo:font-style="normal" fo:font-weight="normal"/>
    </style:style>
    <style:style style:name="P9" style:family="paragraph" style:parent-style-name="Quotations">
      <style:paragraph-properties fo:margin-left="4.001cm" fo:margin-right="0.873cm" fo:text-indent="0cm" style:auto-text-indent="false"/>
      <style:text-properties fo:font-variant="normal" fo:text-transform="none" fo:color="#000000" style:font-name="Arial1" fo:font-size="10pt" fo:letter-spacing="normal" fo:font-style="normal" fo:font-weight="normal" style:font-size-asian="10pt" style:font-weight-asian="normal" style:font-size-complex="10pt" style:font-weight-complex="normal"/>
    </style:style>
    <style:style style:name="P10" style:family="paragraph" style:parent-style-name="Standard">
      <style:text-properties fo:font-size="11pt" style:font-size-asian="11pt" style:font-size-complex="11pt"/>
    </style:style>
    <style:style style:name="P1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2" style:family="paragraph" style:parent-style-name="Text_20_body">
      <style:paragraph-properties fo:margin-left="0cm" fo:margin-right="0cm" fo:text-align="center" style:justify-single-word="false" fo:text-indent="0cm" style:auto-text-indent="false"/>
      <style:text-properties fo:font-variant="normal" fo:text-transform="none" fo:color="#000000" style:font-name="Arial1" fo:font-size="16pt" fo:letter-spacing="normal" fo:font-style="normal" fo:font-weight="bold" style:font-size-asian="16pt" style:font-weight-asian="bold" style:font-size-complex="16pt" style:font-weight-complex="bold"/>
    </style:style>
    <style:style style:name="P13"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font-name="Arial1" fo:font-size="11pt" fo:letter-spacing="normal" fo:font-style="normal" fo:font-weight="normal" style:font-size-asian="11pt" style:font-size-complex="11pt"/>
    </style:style>
    <style:style style:name="P14" style:family="paragraph" style:parent-style-name="Text_20_body">
      <style:paragraph-properties fo:margin-left="0cm" fo:margin-right="0cm" style:line-height-at-least="0.503cm" fo:text-indent="0cm" style:auto-text-indent="false"/>
      <style:text-properties fo:font-variant="normal" fo:text-transform="none" fo:color="#000000" style:font-name="sans-serif" fo:font-size="9.75pt" fo:letter-spacing="normal" fo:font-style="normal" fo:font-weight="normal"/>
    </style:style>
    <style:style style:name="P15" style:family="paragraph" style:parent-style-name="Text_20_body" style:list-style-name="L2">
      <style:paragraph-properties fo:margin-left="0cm" fo:margin-right="0cm" fo:margin-top="0cm" fo:margin-bottom="0cm" style:line-height-at-least="0.503cm" fo:text-indent="0cm" style:auto-text-indent="false" fo:padding="0cm" fo:border="none"/>
      <style:text-properties fo:font-variant="normal" fo:text-transform="none" fo:color="#000000" style:font-name="sans-serif" fo:font-size="9.75pt" fo:letter-spacing="normal" fo:font-style="normal" fo:font-weight="bold"/>
    </style:style>
    <style:style style:name="P16" style:family="paragraph" style:parent-style-name="Text_20_body" style:list-style-name="L3">
      <style:paragraph-properties fo:margin-left="0cm" fo:margin-right="0cm" fo:margin-top="0cm" fo:margin-bottom="0cm" style:line-height-at-least="0.503cm" fo:text-indent="0cm" style:auto-text-indent="false" fo:padding="0cm" fo:border="none"/>
      <style:text-properties fo:font-variant="normal" fo:text-transform="none" fo:color="#000000" style:font-name="sans-serif" fo:font-size="9.75pt" fo:letter-spacing="normal" fo:font-style="normal" fo:font-weight="normal"/>
    </style:style>
    <style:style style:name="P17" style:family="paragraph" style:parent-style-name="Text_20_body" style:list-style-name="L4">
      <style:paragraph-properties style:line-height-at-least="0.503cm"/>
      <style:text-properties fo:font-variant="normal" fo:text-transform="none" fo:color="#000000" style:font-name="sans-serif" fo:font-size="9.75pt" fo:letter-spacing="normal" fo:font-style="normal" fo:font-weight="normal"/>
    </style:style>
    <style:style style:name="P18" style:family="paragraph" style:parent-style-name="Text_20_body" style:list-style-name="L1">
      <style:paragraph-properties fo:margin-left="0.635cm" fo:margin-right="0cm" fo:text-align="justify" style:justify-single-word="false" fo:text-indent="0cm" style:auto-text-indent="false"/>
    </style:style>
    <style:style style:name="P19" style:family="paragraph" style:parent-style-name="Text_20_body" style:list-style-name="L1">
      <style:paragraph-properties fo:margin-left="0.635cm" fo:margin-right="0cm" fo:text-align="justify" style:justify-single-word="false" fo:text-indent="0cm" style:auto-text-indent="false"/>
      <style:text-properties fo:font-variant="normal" fo:text-transform="none" fo:color="#000000" fo:font-size="11pt" fo:letter-spacing="normal" style:font-size-asian="11pt" style:font-size-complex="11pt"/>
    </style:style>
    <style:style style:name="P20" style:family="paragraph" style:parent-style-name="Text_20_body" style:list-style-name="L1">
      <style:paragraph-properties fo:margin-left="0.635cm" fo:margin-right="0cm" fo:text-align="justify" style:justify-single-word="false" fo:text-indent="0cm" style:auto-text-indent="false"/>
      <style:text-properties fo:font-variant="normal" fo:text-transform="none" fo:color="#000000" style:font-name="Arial1" fo:font-size="11pt" fo:letter-spacing="normal" fo:font-style="normal" fo:font-weight="normal" style:font-size-asian="11pt" style:font-size-complex="11pt"/>
    </style:style>
    <style:style style:name="P21" style:family="paragraph" style:parent-style-name="Text_20_body" style:list-style-name="L2">
      <style:paragraph-properties fo:margin-top="0cm" fo:margin-bottom="0cm" style:line-height-at-least="0.503cm" fo:padding="0cm" fo:border="none"/>
      <style:text-properties fo:font-variant="normal" fo:text-transform="none" fo:color="#000000" style:font-name="sans-serif" fo:font-size="9.75pt" fo:letter-spacing="normal" fo:font-style="normal" fo:font-weight="bold"/>
    </style:style>
    <style:style style:name="P22" style:family="paragraph" style:parent-style-name="Text_20_body" style:list-style-name="L3">
      <style:paragraph-properties fo:margin-top="0cm" fo:margin-bottom="0cm" style:line-height-at-least="0.503cm" fo:padding="0cm" fo:border="none"/>
      <style:text-properties fo:font-variant="normal" fo:text-transform="none" fo:color="#000000" style:font-name="sans-serif" fo:font-size="9.75pt" fo:letter-spacing="normal" fo:font-style="normal" fo:font-weight="normal"/>
    </style:style>
    <style:style style:name="P23" style:family="paragraph" style:parent-style-name="Standard">
      <style:text-properties fo:font-size="11pt" style:font-size-asian="11pt" style:font-size-complex="11pt"/>
    </style:style>
    <style:style style:name="P2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5" style:family="paragraph" style:parent-style-name="Heading_20_2">
      <style:paragraph-properties fo:margin-left="0cm" fo:margin-right="0cm" fo:margin-top="0cm" fo:margin-bottom="0cm" style:line-height-at-least="0.503cm" fo:text-indent="0cm" style:auto-text-indent="false" fo:background-color="#ffffff" fo:padding="0cm" fo:border="none">
        <style:background-image/>
      </style:paragraph-properties>
      <style:text-properties fo:font-variant="normal" fo:text-transform="none" fo:color="#000000" style:font-name="sans-serif" fo:font-size="14.25pt" fo:letter-spacing="normal" fo:font-style="normal" fo:font-weight="normal"/>
    </style:style>
    <style:style style:name="P26" style:family="paragraph" style:parent-style-name="Heading_20_3">
      <style:paragraph-properties fo:margin-left="0cm" fo:margin-right="0cm" fo:margin-top="0cm" fo:margin-bottom="0cm" style:line-height-at-least="0.503cm" fo:text-indent="0cm" style:auto-text-indent="false" fo:background-color="#ffffff">
        <style:background-image/>
      </style:paragraph-properties>
      <style:text-properties fo:font-variant="normal" fo:text-transform="none" fo:color="#000000" style:font-name="sans-serif" fo:font-size="12.75pt" fo:letter-spacing="normal" fo:font-style="normal" fo:font-weight="bold"/>
    </style:style>
    <style:style style:name="P27" style:family="paragraph" style:parent-style-name="Heading_20_4">
      <style:paragraph-properties fo:margin-left="0cm" fo:margin-right="0cm" fo:margin-top="0cm" fo:margin-bottom="0cm" style:line-height-at-least="0.503cm" fo:text-indent="0cm" style:auto-text-indent="false" fo:background-color="#ffffff">
        <style:background-image/>
      </style:paragraph-properties>
      <style:text-properties fo:font-variant="normal" fo:text-transform="none" fo:color="#000000" style:font-name="sans-serif" fo:font-size="11.25pt" fo:letter-spacing="normal" fo:font-style="normal" fo:font-weight="bold"/>
    </style:style>
    <style:style style:name="T1" style:family="text">
      <style:text-properties fo:font-weight="bold"/>
    </style:style>
    <style:style style:name="T2" style:family="text">
      <style:text-properties style:font-name="Arial1" fo:font-style="normal" fo:font-weight="normal"/>
    </style:style>
    <style:style style:name="T3" style:family="text">
      <style:text-properties style:font-name="Arial1" fo:font-style="normal" fo:font-weight="bold"/>
    </style:style>
    <style:style style:name="T4" style:family="text">
      <style:text-properties fo:font-variant="normal" fo:text-transform="none" fo:color="#000000" style:font-name="Arial1" fo:font-size="11pt" fo:letter-spacing="normal" fo:font-style="normal" fo:font-weight="normal" style:font-size-asian="11pt" style:font-size-complex="11pt"/>
    </style:style>
    <style:style style:name="T5" style:family="text">
      <style:text-properties fo:font-variant="normal" fo:text-transform="none" fo:color="#000000" style:font-name="Arial1" fo:font-size="11pt" fo:letter-spacing="normal" fo:font-style="normal" fo:font-weight="bold" style:font-size-asian="11pt" style:font-size-complex="11pt"/>
    </style:style>
    <style:style style:name="T6" style:family="text">
      <style:text-properties fo:font-variant="normal" fo:text-transform="none" fo:color="#000000" style:font-name="Arial1" fo:font-size="11pt" fo:letter-spacing="normal" fo:font-style="italic" fo:font-weight="normal" style:font-size-asian="11pt" style:font-size-complex="11pt"/>
    </style:style>
    <style:style style:name="T7" style:family="text">
      <style:text-properties fo:font-variant="normal" fo:text-transform="none" fo:color="#000000" style:font-name="Arial2" fo:font-size="11pt" fo:letter-spacing="normal" fo:font-style="normal" fo:font-weight="normal" style:font-size-asian="11pt" style:font-size-complex="11pt"/>
    </style:style>
    <style:style style:name="T8" style:family="text">
      <style:text-properties fo:font-variant="normal" fo:text-transform="none" fo:color="#000000" fo:letter-spacing="normal"/>
    </style:style>
    <style:style style:name="T9" style:family="text">
      <style:text-properties fo:font-variant="normal" fo:text-transform="none" fo:color="#000000" fo:font-size="11pt" fo:letter-spacing="normal" style:font-size-asian="11pt" style:font-size-complex="11pt"/>
    </style:style>
    <style:style style:name="T10" style:family="text">
      <style:text-properties fo:font-variant="normal" fo:text-transform="none" fo:color="#000000" style:font-name="sans-serif" fo:font-size="9.75pt" fo:letter-spacing="normal" fo:font-style="normal" fo:font-weight="bold"/>
    </style:style>
    <style:style style:name="T11" style:family="text">
      <style:text-properties fo:font-variant="normal" fo:text-transform="none" fo:color="#000000" style:font-name="sans-serif" fo:font-size="9.75pt" fo:letter-spacing="normal" fo:font-style="normal" fo:font-weight="normal"/>
    </style:style>
    <style:style style:name="T12" style:family="text">
      <style:text-properties fo:font-variant="normal" fo:text-transform="none" fo:color="#000000" style:font-name="sans-serif" fo:font-size="9.75pt" fo:letter-spacing="normal" fo:font-style="italic" fo:font-weight="normal"/>
    </style:style>
    <style:style style:name="T13" style:family="text">
      <style:text-properties fo:font-variant="normal" fo:text-transform="none" fo:color="#000000" style:font-name="sans-serif" fo:font-size="9.75pt" fo:letter-spacing="normal" fo:font-style="italic" fo:font-weight="bold"/>
    </style:style>
    <style:style style:name="T14" style:family="text">
      <style:text-properties fo:font-variant="normal" fo:text-transform="none" fo:color="#000000" style:font-name="sans-serif" fo:font-size="11pt" fo:letter-spacing="normal" fo:font-style="normal" fo:font-weight="normal" style:font-size-asian="11pt" style:font-size-complex="11pt"/>
    </style:style>
    <style:style style:name="T15" style:family="text">
      <style:text-properties fo:font-variant="normal" fo:text-transform="none" fo:color="#999933" style:font-name="Arial1" fo:font-size="11pt" fo:letter-spacing="normal" fo:font-style="normal" fo:font-weight="normal" style:font-size-asian="11pt" style:font-size-complex="11pt"/>
    </style:style>
    <style:style style:name="T16" style:family="text">
      <style:text-properties fo:font-variant="normal" fo:text-transform="none" fo:color="#999933" style:font-name="Arial1" fo:font-size="11pt" fo:letter-spacing="normal" fo:font-style="normal" fo:font-weight="bold" style:font-size-asian="11pt" style:font-size-complex="11pt"/>
    </style:style>
    <style:style style:name="T17" style:family="text">
      <style:text-properties fo:font-variant="normal" fo:text-transform="none" fo:color="#0b0080" style:text-line-through-style="none" style:font-name="sans-serif" fo:letter-spacing="normal" fo:font-style="normal" style:text-underline-style="none" fo:font-weight="normal" style:text-blinking="false"/>
    </style:style>
    <style:style style:name="T18" style:family="text">
      <style:text-properties fo:font-variant="normal" fo:text-transform="none" fo:color="#0b0080" style:text-line-through-style="none" style:font-name="sans-serif" fo:font-size="9.75pt" fo:letter-spacing="normal" fo:font-style="normal" style:text-underline-style="none" fo:font-weight="normal" style:text-blinking="false"/>
    </style:style>
    <style:style style:name="T19" style:family="text">
      <style:text-properties fo:font-variant="normal" fo:text-transform="none" fo:color="#0b0080" style:text-line-through-style="none" style:font-name="sans-serif" fo:font-size="9.75pt" fo:letter-spacing="normal" fo:font-style="normal" style:text-underline-style="none" fo:font-weight="normal" style:text-blinking="false" fo:background-color="#ffffff"/>
    </style:style>
    <style:style style:name="T20" style:family="text">
      <style:text-properties fo:font-variant="normal" fo:text-transform="none" fo:color="#660099" style:font-name="sans-serif" fo:font-size="11pt" fo:letter-spacing="normal" fo:font-style="normal" fo:font-weight="normal" fo:background-color="transparent" style:font-size-asian="11pt" style:font-size-complex="11pt"/>
    </style:style>
    <style:style style:name="T21" style:family="text">
      <style:text-properties fo:font-variant="normal" fo:text-transform="none" fo:color="#a55858" style:text-line-through-style="none" style:font-name="sans-serif" fo:font-size="9.75pt" fo:letter-spacing="normal" fo:font-style="normal" style:text-underline-style="none" fo:font-weight="normal" style:text-blinking="false"/>
    </style:style>
    <style:style style:name="T22" style:family="text">
      <style:text-properties fo:font-variant="normal" fo:text-transform="none" fo:color="#663366" style:text-line-through-style="none" style:font-name="sans-serif" fo:font-size="9.75pt" fo:letter-spacing="normal" fo:font-style="normal" style:text-underline-style="none" fo:font-weight="normal" style:text-blinking="false" fo:background-color="#ffffff"/>
    </style:style>
    <style:style style:name="T23" style:family="text">
      <style:text-properties fo:font-style="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RDF</text:p>
      <text:p text:style-name="P13"/>
      <text:p text:style-name="P13">The Resource Description Framework (RDF) is a general-purpose language for representing information in the Web.</text:p>
      <text:p text:style-name="P2"><text:span text:style-name="T14">This document defines an </text:span><text:a xlink:type="simple" xlink:href="http://www.w3.org/TR/2000/REC-xml-20001006"><text:span text:style-name="T20">XML</text:span></text:a><text:span text:style-name="T14"> syntax for RDF called RDF/XML in terms of </text:span><text:a xlink:type="simple" xlink:href="http://www.w3.org/TR/1999/REC-xml-names-19990114/"><text:span text:style-name="T20">Namespaces in XML</text:span></text:a><text:span text:style-name="T14">, the </text:span><text:a xlink:type="simple" xlink:href="http://www.w3.org/TR/2001/REC-xml-infoset-20011024/"><text:span text:style-name="T20">XML Information Set</text:span></text:a><text:span text:style-name="T14"> and </text:span><text:a xlink:type="simple" xlink:href="http://www.w3.org/TR/2001/REC-xmlbase-20010627/"><text:span text:style-name="T20">XML Base</text:span></text:a><text:span text:style-name="T14">. The </text:span><text:a xlink:type="simple" xlink:href="http://www.w3.org/TR/rdf-syntax-grammar/#section-Infoset-Grammar"><text:span text:style-name="T20">formal grammar</text:span></text:a><text:span text:style-name="T14"> for the syntax is annotated with actions generating triples of the </text:span><text:a xlink:type="simple" xlink:href="http://www.w3.org/TR/2004/REC-rdf-concepts-20040210/#dfn-rdf-graph"><text:span text:style-name="T20">RDF graph</text:span></text:a><text:span text:style-name="T14"> as defined in </text:span><text:a xlink:type="simple" xlink:href="http://www.w3.org/TR/2004/REC-rdf-concepts-20040210/"><text:span text:style-name="T20">RDF Concepts and Abstract Syntax</text:span></text:a><text:span text:style-name="T14">. The triples are written using the </text:span><text:a xlink:type="simple" xlink:href="http://www.w3.org/TR/2004/REC-rdf-testcases-20040210/#ntriples"><text:span text:style-name="T20">N-Triples</text:span></text:a><text:span text:style-name="T14"> RDF graph serializing format which enables more precise recording of the mapping in a machine processable form. The mappings are recorded as tests cases, gathered and published in </text:span><text:a xlink:type="simple" xlink:href="http://www.w3.org/TR/2004/REC-rdf-testcases-20040210/"><text:span text:style-name="T20">RDF Test Cases</text:span></text:a><text:span text:style-name="T14">.</text:span></text:p>
      <text:p text:style-name="P13"/>
      <text:p text:style-name="P3"><text:span text:style-name="T4">RDF también provee una </text:span><text:span text:style-name="T5">sintaxis basada en </text:span><text:a xlink:type="simple" xlink:href="http://www.hipertexto.info/documentos/xml.htm"><text:span text:style-name="T16">XML</text:span></text:a><text:span text:style-name="T4"> (llamada </text:span><text:span text:style-name="Emphasis"><text:span text:style-name="T4">RDF/XML</text:span></text:span><text:span text:style-name="T4">) para guardar e intercambiar estos grafos. Este ejemplo es una pequeña muestra de RDF en RDF/XML correspondiente al grafo de la ilustración anterior.</text:span></text:p>
      <text:p text:style-name="P9">&lt;?xml version="1.0"?&gt;<text:line-break/>&lt;rdf:RDF xmlns:rdf="http://www.w3.org/1999/02/22-rdf-syntax-ns#"<text:line-break/>    xmlns:contact="http://www.w3.org/2000/10/swap/pim/contact#"&gt;<text:line-break/><text:line-break/>  &lt;contact:Person rdf:about="http://www.w3.org/People/EM/contact#me"&gt;<text:line-break/>    &lt;contact:fullName&gt;Eric Miller&lt;/contact:fullName&gt;<text:line-break/>    &lt;contact:mailbox rdf:resource="mailto:em@w3.org"/&gt;<text:line-break/>    &lt;contact:personalTitle&gt;Dr.&lt;/contact:personalTitle&gt; <text:line-break/>  &lt;/contact:Person&gt;<text:line-break/><text:line-break/>&lt;/rdf:RDF&gt;</text:p>
      <text:p text:style-name="P3"><text:span text:style-name="T4">Este RDF/XML también contiene </text:span><text:a xlink:type="simple" xlink:href="http://www.hipertexto.info/documentos/localiz.htm#URI"><text:span text:style-name="T15">URIs</text:span></text:a><text:span text:style-name="T4">, y propiedades como </text:span><text:span text:style-name="Source_20_Text"><text:span text:style-name="T5">mailbox</text:span></text:span><text:span text:style-name="T7"> </text:span><text:span text:style-name="T4">y </text:span><text:span text:style-name="Source_20_Text"><text:span text:style-name="T5">fullName</text:span></text:span><text:span text:style-name="T7"> </text:span><text:span text:style-name="T4">(en forma abreviada), y sus respectivos valores </text:span><text:span text:style-name="Source_20_Text"><text:span text:style-name="T5">em@w3.org</text:span></text:span><text:span text:style-name="T4">, y </text:span><text:span text:style-name="Source_20_Text"><text:span text:style-name="T5">Eric Miller</text:span></text:span><text:span text:style-name="T5">.</text:span></text:p>
      <text:p text:style-name="P3"><text:span text:style-name="T4">Como </text:span><text:a xlink:type="simple" xlink:href="http://www.hipertexto.info/documentos/html.htm"><text:span text:style-name="T15">HTML</text:span></text:a><text:span text:style-name="T4">, este RDF/XML es procesable por máquina y, usando </text:span><text:a xlink:type="simple" xlink:href="http://www.hipertexto.info/documentos/localiz.htm#URI"><text:span text:style-name="T15">URIs</text:span></text:a><text:span text:style-name="T4"> se pueden </text:span><text:a xlink:type="simple" xlink:href="http://www.hipertexto.info/documentos/enlaces.htm"><text:span text:style-name="T15">enlazar</text:span></text:a><text:span text:style-name="T4"> las piezas de información a lo largo de la </text:span><text:a xlink:type="simple" xlink:href="http://www.hipertexto.info/documentos/web.htm"><text:span text:style-name="T15">Web</text:span></text:a><text:span text:style-name="T4">. Sin embargo, al contrario que el hipertexto convencional, los </text:span><text:a xlink:type="simple" xlink:href="http://www.hipertexto.info/documentos/localiz.htm#URI"><text:span text:style-name="T15">URIs</text:span></text:a><text:span text:style-name="T4"> de RDF pueden hacer referencia a cualquier cosa identificable, incluyendo cosas que pueden no ser directamente recuperables en la </text:span><text:a xlink:type="simple" xlink:href="http://www.hipertexto.info/documentos/web.htm"><text:span text:style-name="T15">Web</text:span></text:a><text:span text:style-name="T4"> (tales como la persona </text:span><text:span text:style-name="T5">Eric Miller</text:span><text:span text:style-name="T4">). El resultado es que, en adición para describir tales cosas como páginas </text:span><text:span text:style-name="T6">web</text:span><text:span text:style-name="T4">, RDF puede también describir coches, negocios, gente, noticias, eventos etc. E incluso, las propiedades RDF que tienen los </text:span><text:a xlink:type="simple" xlink:href="http://www.hipertexto.info/documentos/localiz.htm#URI"><text:span text:style-name="T15">URIs</text:span></text:a><text:span text:style-name="T4">, para precisamente identificar las relaciones que existen entre los términos enlazados. En RDF tanto los sujetos, como las propiedades y los objetos, son recursos.</text:span></text:p>
      <text:p text:style-name="P4">El modelo de datos de RDF se basa en <text:span text:style-name="T1">3 elementos fundamentales</text:span>:</text:p>
      <text:list xml:id="list31289984" text:style-name="L1">
        <text:list-item>
          <text:p text:style-name="P18"><text:span text:style-name="T9"> </text:span><text:span text:style-name="T5">recursos</text:span><text:span text:style-name="T4">: son todas las cosas descritas por expresiones RDF, desde una página web completa como un documento HTML "</text:span><text:a xlink:type="simple" xlink:href="http://www.w3.org/Overview.html"><text:span text:style-name="T15">http://www.w3.org/Overview.html</text:span></text:a><text:span text:style-name="T4">" o una colección completa de páginas, hasta una parte de una página web, por ejemplo, un elemento </text:span><text:a xlink:type="simple" xlink:href="http://www.hipertexto.info/documentos/html.htm"><text:span text:style-name="T15">HTML</text:span></text:a><text:span text:style-name="T4"> o </text:span><text:a xlink:type="simple" xlink:href="http://www.hipertexto.info/documentos/xml.htm"><text:span text:style-name="T15">XML</text:span></text:a><text:span text:style-name="T4"> específico dentro de un documento fuente. Un recursos puede ser también un objeto que no sea directamente accesible vía Web, por ejemplo un libro impreso. Los recursos se designan siempre mediante </text:span><text:a xlink:type="simple" xlink:href="http://www.hipertexto.info/documentos/localiz.htm#URI"><text:span text:style-name="T15">URIs</text:span></text:a><text:span text:style-name="T4"> y la extensibilidad de estos, permite la introducción de identificadores para cualquier entidad imaginable.</text:span></text:p>
        </text:list-item>
        <text:list-item>
          <text:p text:style-name="P19"> <text:span text:style-name="T3">propiedades</text:span><text:span text:style-name="T2">: una propiedad es un aspecto específico, característica, atributo o relación que puede utilizarse para describir un recurso. Cada propiedad tiene un significado específico, define sus valores permitidos, los tipo de recursos que puede describir y sus relaciones con las propiedades. </text:span></text:p>
        </text:list-item>
        <text:list-item>
          <text:p text:style-name="P19"> <text:span text:style-name="T3">declaraciones</text:span><text:span text:style-name="T2"> (sentencias o enunciados): una declaración RDF es una propiedad más el valor de dicha propiedad para un recurso específico. Así pues, una declaración o sentencia está compuesta por 3 partes individuales:</text:span></text:p>
          <text:list>
            <text:list-item>
              <text:p text:style-name="P20"><text:soft-page-break/><text:span text:style-name="T1">sujeto</text:span>: recurso</text:p>
            </text:list-item>
            <text:list-item>
              <text:p text:style-name="P20"><text:span text:style-name="T1">predicado</text:span>: propiedad</text:p>
            </text:list-item>
            <text:list-item>
              <text:p text:style-name="P18"><text:span text:style-name="T5">objeto</text:span><text:span text:style-name="T4">: valor de la propiedad (puede ser otro recurso -especificado por un </text:span><text:a xlink:type="simple" xlink:href="http://www.hipertexto.info/documentos/localiz.htm#URI"><text:span text:style-name="T15">URI</text:span></text:a><text:span text:style-name="T4">- o un literal (una cadena simple de caracteres u otros tipos de datos primitivos definidos por </text:span><text:a xlink:type="simple" xlink:href="http://www.hipertexto.info/documentos/xml.htm"><text:span text:style-name="T15">XML</text:span></text:a><text:span text:style-name="T4">). El contenido de un literal no es interpretado por RDF en sí mismo y puede contener marcado </text:span><text:a xlink:type="simple" xlink:href="http://www.hipertexto.info/documentos/xml.htm"><text:span text:style-name="T15">XML</text:span></text:a><text:span text:style-name="T4"> adicional. Los literales se distinguen de los recursos en que el modelo RDF no permite que los literales sean sujeto de una declaración.</text:span></text:p>
            </text:list-item>
          </text:list>
        </text:list-item>
      </text:list>
      <text:p text:style-name="P10"><text:span text:style-name="T10">RDF/XML</text:span><text:span text:style-name="T8"> </text:span><text:bookmark text:name="cite_ref-syntaxspec_1-0"/><text:a xlink:type="simple" xlink:href="http://es.wikipedia.org/wiki/RDF/XML#cite_note-syntaxspec-1"><text:span text:style-name="T17">1</text:span></text:a><text:span text:style-name="T8"> </text:span><text:span text:style-name="T11">, es una sintaxis, definida por el </text:span><text:a xlink:type="simple" xlink:href="http://es.wikipedia.org/wiki/W3C"><text:span text:style-name="T19">W3C</text:span></text:a><text:span text:style-name="T11">, para expresar (es decir, serializar) un grafo </text:span><text:a xlink:type="simple" xlink:href="http://es.wikipedia.org/wiki/Resource_Description_Framework"><text:span text:style-name="T19">RDF</text:span></text:a><text:span text:style-name="T8"> </text:span><text:span text:style-name="T11">como un documento XML. Según el </text:span><text:a xlink:type="simple" xlink:href="http://es.wikipedia.org/wiki/W3C"><text:span text:style-name="T19">W3C</text:span></text:a><text:span text:style-name="T11">, "RDF/XML es la sintaxis normativa para escribir RDF".</text:span><text:bookmark text:name="cite_ref-primer_2-0"/><text:a xlink:type="simple" xlink:href="http://es.wikipedia.org/wiki/RDF/XML#cite_note-primer-2"><text:span text:style-name="T17">2</text:span></text:a> </text:p>
      <text:p text:style-name="P10"/>
      <text:p text:style-name="P10"/>
      <text:p text:style-name="P10"/>
      <text:p text:style-name="P10"/>
      <text:p text:style-name="P10"/>
      <text:p text:style-name="P11">OWL</text:p>
      <text:p text:style-name="P10"/>
      <text:p text:style-name="P1"><text:span text:style-name="T10">OWL</text:span><text:span text:style-name="T11"> es el </text:span><text:a xlink:type="simple" xlink:href="http://es.wikipedia.org/wiki/Acrónimo"><text:span text:style-name="T18">acrónimo</text:span></text:a><text:span text:style-name="T11"> del </text:span><text:a xlink:type="simple" xlink:href="http://es.wikipedia.org/wiki/Idioma_inglés"><text:span text:style-name="T18">inglés</text:span></text:a><text:span text:style-name="T11"> </text:span><text:span text:style-name="T10">Web Ontology Language</text:span><text:span text:style-name="T11">, un </text:span><text:a xlink:type="simple" xlink:href="http://es.wikipedia.org/wiki/Lenguaje_de_marcado"><text:span text:style-name="T18">lenguaje de marcado</text:span></text:a><text:span text:style-name="T11"> para publicar y compartir datos usando </text:span><text:a xlink:type="simple" xlink:href="http://es.wikipedia.org/wiki/Ontología_(Informática)"><text:span text:style-name="T18">ontologías</text:span></text:a><text:span text:style-name="T11"> en la </text:span><text:a xlink:type="simple" xlink:href="http://es.wikipedia.org/wiki/WWW"><text:span text:style-name="T18">WWW</text:span></text:a><text:span text:style-name="T11">. </text:span><text:span text:style-name="T10">OWL</text:span><text:span text:style-name="T11"> tiene como objetivo facilitar un modelo de marcado construido sobre </text:span><text:a xlink:type="simple" xlink:href="http://es.wikipedia.org/wiki/Marco_de_descripción_de_recursos"><text:span text:style-name="T18">RDF</text:span></text:a><text:span text:style-name="T11"> y codificado en </text:span><text:a xlink:type="simple" xlink:href="http://es.wikipedia.org/wiki/XML"><text:span text:style-name="T18">XML</text:span></text:a><text:span text:style-name="T11">.</text:span></text:p>
      <text:p text:style-name="P6"><text:span text:style-name="T11">Tiene como antecedente </text:span><text:a xlink:type="simple" xlink:href="http://es.wikipedia.org/wiki/DAML"><text:span text:style-name="T18">DAML</text:span></text:a><text:span text:style-name="T11">+</text:span><text:a xlink:type="simple" xlink:href="http://es.wikipedia.org/w/index.php?title=OIL&amp;action=edit&amp;redlink=1"><text:span text:style-name="T21">OIL</text:span></text:a><text:span text:style-name="T11">, en los cuales se inspiraron los creadores de </text:span><text:span text:style-name="T10">OWL</text:span><text:span text:style-name="T11"> para crear el lenguaje. Junto al entorno </text:span><text:a xlink:type="simple" xlink:href="http://es.wikipedia.org/wiki/Marco_de_descripción_de_recursos"><text:span text:style-name="T18">RDF</text:span></text:a><text:span text:style-name="T11"> y otros componentes, estas herramientas hacen posible el proyecto de </text:span><text:a xlink:type="simple" xlink:href="http://es.wikipedia.org/wiki/Web_semántica"><text:span text:style-name="T18">web semántica</text:span></text:a><text:span text:style-name="T11">.</text:span></text:p>
      <text:p text:style-name="P5"/>
      <text:h text:style-name="P25" text:outline-level="2"><text:bookmark text:name="Variantes"/>Variantes</text:h>
      <text:p text:style-name="P5">Actualmente, OWL tiene tres variantes:</text:p>
      <text:list xml:id="list31278321" text:style-name="L2">
        <text:list-item>
          <text:p text:style-name="P15">OWL Lite</text:p>
        </text:list-item>
        <text:list-item>
          <text:p text:style-name="P21">OWL DL</text:p>
        </text:list-item>
        <text:list-item>
          <text:p text:style-name="P21">OWL Full</text:p>
        </text:list-item>
      </text:list>
      <text:p text:style-name="P7"/>
      <text:p text:style-name="P8">The W3C-endorsed OWL specification includes the definition of three variants of OWL, with different levels of expressiveness. These are OWL Lite, OWL DL and OWL Full (ordered by increasing expressiveness). Each of these sublanguages is a syntactic extension of its simpler predecessor. The following set of relations hold. Their inverses do not.</text:p>
      <text:p text:style-name="P8"/>
      <text:list xml:id="list31282863" text:style-name="L3">
        <text:list-item>
          <text:p text:style-name="P16">Every legal OWL Lite ontology is a legal OWL DL ontology.</text:p>
        </text:list-item>
        <text:list-item>
          <text:p text:style-name="P22">Every legal OWL DL ontology is a legal OWL Full ontology.</text:p>
        </text:list-item>
        <text:list-item>
          <text:p text:style-name="P22">Every valid OWL Lite conclusion is a valid OWL DL conclusion.</text:p>
        </text:list-item>
        <text:list-item>
          <text:p text:style-name="P22">Every valid OWL DL conclusion is a valid OWL Full conclusion.</text:p>
          <text:p text:style-name="P22"/>
        </text:list-item>
      </text:list>
      <text:h text:style-name="P27" text:outline-level="4"/>
      <text:h text:style-name="P27" text:outline-level="4"><text:bookmark text:name="OWL_Lite"/>OWL Lite</text:h>
      <text:p text:style-name="P6"><text:span text:style-name="T11">OWL Lite was originally intended to support those users primarily needing a classification hierarchy and simple constraints. For example, while it supports </text:span><text:a xlink:type="simple" xlink:href="http://en.wikipedia.org/wiki/Cardinality"><text:span text:style-name="T18">cardinality</text:span></text:a><text:span text:style-name="T11"> constraints, it only permits cardinality values of 0 or 1. It was hoped that it would be simpler to provide tool support for OWL Lite than its more expressive relatives, allowing quick migration path for systems utilizing </text:span><text:a xlink:type="simple" xlink:href="http://en.wikipedia.org/wiki/Thesaurus"><text:span text:style-name="T18">thesauri</text:span></text:a><text:span text:style-name="T11"> and other </text:span><text:a xlink:type="simple" xlink:href="http://en.wikipedia.org/wiki/Taxonomy_(general)"><text:span text:style-name="T18">taxonomies</text:span></text:a><text:span text:style-name="T11">. In practice, however, most of the expressiveness constraints placed on OWL Lite amount to little more than syntactic inconveniences: most of the constructs available in OWL DL can be built using complex combinations of OWL Lite features.</text:span><text:a xlink:type="simple" xlink:href="http://en.wikipedia.org/wiki/Web_Ontology_Language#cite_note-grau.2008-21"><text:span text:style-name="T18"> </text:span></text:a><text:span text:style-name="T11">Development of OWL Lite tools has thus proven almost as difficult as development of tools for OWL DL, and OWL Lite is not widely used.</text:span></text:p>
      <text:h text:style-name="P27" text:outline-level="4"><text:soft-page-break/></text:h>
      <text:h text:style-name="P27" text:outline-level="4"><text:bookmark text:name="OWL_DL"/>OWL DL</text:h>
      <text:p text:style-name="P6"><text:span text:style-name="T11">OWL DL was designed to provide the maximum expressiveness possible while retaining computational </text:span><text:a xlink:type="simple" xlink:href="http://en.wikipedia.org/wiki/Complete_theory"><text:span text:style-name="T18">completeness</text:span></text:a><text:span text:style-name="T11"> (either φ or ¬φ belong), </text:span><text:a xlink:type="simple" xlink:href="http://en.wikipedia.org/wiki/Decidability_(logic)"><text:span text:style-name="T18">decidability</text:span></text:a><text:span text:style-name="T11"> (there is an effective procedure to determine whether φ is derivable or not), and the availability of practical reasoning algorithms. OWL DL includes all OWL language constructs, but they can be used only under certain restrictions (for example, number restrictions may not be placed upon properties which are declared to be transitive). OWL DL is so named due to its correspondence with description logic, a field of research that has studied the logics that form the formal foundation of OWL.</text:span></text:p>
      <text:p text:style-name="P5"/>
      <text:h text:style-name="P27" text:outline-level="4"><text:bookmark text:name="OWL_Full"/>OWL Full</text:h>
      <text:p text:style-name="P5">OWL Full is based on a different semantics from OWL Lite or OWL DL, and was designed to preserve some compatibility with RDF Schema. For example, in OWL Full a class can be treated simultaneously as a collection of individuals and as an individual in its own right; this is not permitted in OWL DL. OWL Full allows an ontology to augment the meaning of the pre-defined (RDF or OWL) vocabulary. OWL Full is undecidable, so no reasoning software is able to perform complete reasoning for it.</text:p>
      <text:p text:style-name="P5"/>
      <text:h text:style-name="P26" text:outline-level="3"><text:bookmark text:name="OWL2_profiles"/>OWL2 profiles</text:h>
      <text:p text:style-name="P5">In OWL 2, there are three sublanguages of the language. </text:p>
      <text:list xml:id="list31282458" text:style-name="L4">
        <text:list-item>
          <text:p text:style-name="P17">OWL 2 EL is a fragment that has polynomial time reasoning complexity; </text:p>
        </text:list-item>
        <text:list-item>
          <text:p text:style-name="P17">OWL 2 QL is designed to enable easier access and query to data stored in databases; </text:p>
        </text:list-item>
        <text:list-item>
          <text:p text:style-name="P17">OWL 2 RL is a rule subset of OWL 2.</text:p>
        </text:list-item>
      </text:list>
      <text:p text:style-name="P7"/>
      <text:p text:style-name="P5">Estas variantes incorporan diferentes funcionalidades, y en general, <text:span text:style-name="T23">OWL Lite</text:span> es más sencillo que <text:span text:style-name="T23">OWL DL</text:span>, y <text:span text:style-name="T23">OWL DL</text:span> es más sencillo que <text:span text:style-name="T23">OWL Full</text:span>. <text:span text:style-name="T23">OWL Lite</text:span> y <text:span text:style-name="T23">OWL DL</text:span> está construido de tal forma que toda sentencia pueda ser resuelta en tiempo finito, la versión más completa de <text:span text:style-name="T23">OWL Full</text:span> puede contener 'bucles' infinitos.</text:p>
      <text:p text:style-name="P6"><text:span text:style-name="T12">OWL DL</text:span><text:span text:style-name="T11"> se basa en la </text:span><text:a xlink:type="simple" xlink:href="http://es.wikipedia.org/wiki/Lógica_descriptiva"><text:span text:style-name="T18">lógica descriptiva</text:span></text:a><text:span text:style-name="T11"> </text:span><text:span text:style-name="T11"><draw:frame draw:style-name="fr1" draw:name="gráficos1" text:anchor-type="as-char" svg:width="2.884cm" svg:height="0.556cm" draw:z-index="0"><draw:image xlink:href="http://upload.wikimedia.org/math/5/7/4/574335e9eb6ee2b31e11e14572f70317.png" xlink:type="simple" xlink:show="embed" xlink:actuate="onLoad"/><svg:title>\mathcal{SHOIN} (D)</svg:title></draw:frame></text:span><text:span text:style-name="T11">. El subconjunto </text:span><text:span text:style-name="T12">OWL Lite</text:span><text:span text:style-name="T11"> se basa en la lógica menos expresiva </text:span><text:span text:style-name="T11"><draw:frame draw:style-name="fr1" draw:name="gráficos2" text:anchor-type="as-char" svg:width="2.381cm" svg:height="0.556cm" draw:z-index="1"><draw:image xlink:href="http://upload.wikimedia.org/math/3/0/b/30bee5f56e8df4147ec5ad26d03ed527.png" xlink:type="simple" xlink:show="embed" xlink:actuate="onLoad"/><svg:title>\mathcal{SHIF} (D)</svg:title></draw:frame></text:span><text:span text:style-name="T11">.</text:span></text:p>
      <text:p text:style-name="P10"/>
      <text:p text:style-name="P10"/>
      <text:p text:style-name="P10"/>
      <text:p text:style-name="P10"/>
      <text:p text:style-name="P11">RDFS (RDF Schema)</text:p>
      <text:p text:style-name="P10"/>
      <text:p text:style-name="P10"><text:span text:style-name="T10">RDF Schema</text:span><text:span text:style-name="T8"> </text:span><text:span text:style-name="T11">(variously abbreviated as </text:span><text:span text:style-name="T10">RDFS</text:span><text:span text:style-name="T11">, </text:span><text:span text:style-name="T10">RDF(S)</text:span><text:span text:style-name="T11">, </text:span><text:span text:style-name="T10">RDF-S</text:span><text:span text:style-name="T11">, or </text:span><text:span text:style-name="T10">RDF/S</text:span><text:span text:style-name="T11">) is a set of classes with certain properties using the </text:span><text:a xlink:type="simple" xlink:href="http://en.wikipedia.org/wiki/Resource_Description_Framework"><text:span text:style-name="T19">RDF</text:span></text:a><text:span text:style-name="T11">extensible </text:span><text:a xlink:type="simple" xlink:href="http://en.wikipedia.org/wiki/Knowledge_representation"><text:span text:style-name="T19">knowledge representation</text:span></text:a><text:span text:style-name="T8"> </text:span><text:span text:style-name="T11">language, providing basic elements for the description of </text:span><text:a xlink:type="simple" xlink:href="http://en.wikipedia.org/wiki/Ontology_(computer_science)"><text:span text:style-name="T19">ontologies</text:span></text:a><text:span text:style-name="T11">, otherwise called RDF vocabularies, intended to structure RDF </text:span><text:a xlink:type="simple" xlink:href="http://en.wikipedia.org/wiki/Web_resource"><text:span text:style-name="T19">resources</text:span></text:a><text:span text:style-name="T11">. These resources can be saved in a </text:span><text:a xlink:type="simple" xlink:href="http://en.wikipedia.org/wiki/Triplestore"><text:span text:style-name="T19">triplestore</text:span></text:a><text:span text:style-name="T8"> </text:span><text:span text:style-name="T11">to reach them with the query language </text:span><text:a xlink:type="simple" xlink:href="http://en.wikipedia.org/wiki/SPARQL"><text:span text:style-name="T19">SPARQL</text:span></text:a><text:span text:style-name="T11">.</text:span> </text:p>
      <text:p text:style-name="P10"><text:span text:style-name="T11">Many RDFS components are included in the more expressive language </text:span><text:a xlink:type="simple" xlink:href="http://en.wikipedia.org/wiki/Web_Ontology_Language"><text:span text:style-name="T19">Web Ontology Language</text:span></text:a><text:span text:style-name="T11">(OWL).</text:span> </text:p>
      <text:p text:style-name="P10"/>
      <text:p text:style-name="P10"/>
      <text:p text:style-name="P11">SPARQL</text:p>
      <text:p text:style-name="P10"/>
      <text:p text:style-name="P10"><text:span text:style-name="T10">SPARQL</text:span><text:span text:style-name="T8"> </text:span><text:span text:style-name="T11">(pronounced "</text:span><text:a xlink:type="simple" xlink:href="http://en.wiktionary.org/wiki/sparkle"><text:span text:style-name="T22">sparkle</text:span></text:a><text:span text:style-name="T11">", a </text:span><text:a xlink:type="simple" xlink:href="http://en.wikipedia.org/wiki/Recursive_acronym"><text:span text:style-name="T19">recursive acronym</text:span></text:a><text:span text:style-name="T8"> </text:span><text:span text:style-name="T11">for </text:span><text:span text:style-name="T13">S</text:span><text:span text:style-name="T12">PARQL </text:span><text:span text:style-name="T13">P</text:span><text:span text:style-name="T12">rotocol </text:span><text:span text:style-name="T13">a</text:span><text:span text:style-name="T12">nd </text:span><text:span text:style-name="T13">R</text:span><text:span text:style-name="T12">DF </text:span><text:span text:style-name="T13">Q</text:span><text:span text:style-name="T12">uery </text:span><text:span text:style-name="T13">L</text:span><text:span text:style-name="T12">anguage</text:span><text:span text:style-name="T11">) is an </text:span><text:a xlink:type="simple" xlink:href="http://en.wikipedia.org/wiki/RDF_query_language"><text:span text:style-name="T19">RDF query language</text:span></text:a><text:span text:style-name="T11">, that is, a </text:span><text:a xlink:type="simple" xlink:href="http://en.wikipedia.org/wiki/Query_language"><text:span text:style-name="T19">query language</text:span></text:a><text:span text:style-name="T8"> </text:span><text:span text:style-name="T11">for </text:span><text:a xlink:type="simple" xlink:href="http://en.wikipedia.org/wiki/Database"><text:span text:style-name="T19">databases</text:span></text:a><text:span text:style-name="T11">, able to retrieve and manipulate data stored in </text:span><text:a xlink:type="simple" xlink:href="http://en.wikipedia.org/wiki/Resource_Description_Framework"><text:span text:style-name="T19">Resource Description Framework</text:span></text:a><text:span text:style-name="T8"> </text:span><text:span text:style-name="T11">format.</text:span> </text:p>
      <text:p text:style-name="P10">SPARQL 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Arial2" svg:font-family="Arial, Helvetica"/>
    <style:font-face style:name="OpenSymbol" svg:font-family="OpenSymbol"/>
    <style:font-face style:name="Tahoma1" svg:font-family="Tahoma"/>
    <style:font-face style:name="sans-serif" svg:font-family="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PMincho" style:font-size-asian="12pt" style:font-weight-asian="bold" style:font-name-complex="Tahoma"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0H19M09S</meta:editing-duration>
    <meta:editing-cycles>8</meta:editing-cycles>
    <meta:generator>OpenOffice.org/3.1$Win32 OpenOffice.org_project/310m11$Build-9399</meta:generator>
    <dc:date>2013-07-06T11:15:03.18</dc:date>
    <dc:creator>Laura Flores</dc:creator>
    <meta:document-statistic meta:table-count="0" meta:image-count="2" meta:object-count="0" meta:page-count="3" meta:paragraph-count="47" meta:word-count="1319" meta:character-count="8428"/>
    <meta:user-defined meta:name="Info 1"/>
    <meta:user-defined meta:name="Info 2"/>
    <meta:user-defined meta:name="Info 3"/>
    <meta:user-defined meta:name="Info 4"/>
  </office:meta>
</office:document-meta>
</file>